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left="0.2661in" fo:margin-right="0in" fo:text-align="start" style:justify-single-word="false" fo:text-indent="0.0102in" style:auto-text-indent="false">
        <style:tab-stops/>
      </style:paragraph-properties>
      <style:text-properties fo:font-size="12pt" fo:font-weight="normal" style:font-size-asian="12pt" style:font-weight-asian="normal" style:font-size-complex="12pt" style:font-weight-complex="normal"/>
    </style:style>
    <style:style style:name="P4" style:family="paragraph" style:parent-style-name="Standard">
      <style:paragraph-properties fo:margin-left="0.2661in" fo:margin-right="0in" fo:text-align="start" style:justify-single-word="false" fo:text-indent="0in" style:auto-text-indent="false">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2874in" fo:margin-right="0in" fo:text-align="start" style:justify-single-word="false" fo:text-indent="0in" style:auto-text-indent="false">
        <style:tab-stops/>
      </style:paragraph-properties>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ab-stops>
          <style:tab-stop style:position="0.3618in"/>
        </style:tab-stops>
      </style:paragraph-properties>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ab-stops>
          <style:tab-stop style:position="0.3618in"/>
        </style:tab-stops>
      </style:paragraph-properties>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ab-stops>
          <style:tab-stop style:position="0.3618in"/>
        </style:tab-stops>
      </style:paragraph-properties>
      <style:text-properties fo:font-variant="normal" fo:text-transform="none" fo:color="#000000" style:text-line-through-style="none" style:font-name="Arial" fo:font-size="11.5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style:style>
    <style:style style:name="P11"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list-style-name="L1">
      <style:paragraph-properties fo:margin-left="0.2874in" fo:margin-right="0in" fo:text-align="start" style:justify-single-word="false" fo:text-indent="0in" style:auto-text-indent="false">
        <style:tab-stops/>
      </style:paragraph-properties>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list-style-name="L1">
      <style:paragraph-properties fo:margin-left="0.2764in" fo:margin-right="0in" fo:text-align="start" style:justify-single-word="false" fo:text-indent="-0.2445in" style:auto-text-indent="false">
        <style:tab-stops/>
      </style:paragraph-properties>
    </style:style>
    <style:style style:name="P15" style:family="paragraph" style:parent-style-name="Standard" style:list-style-name="L1">
      <style:paragraph-properties fo:margin-left="0.8752in" fo:margin-right="0in" fo:text-align="start" style:justify-single-word="false" fo:text-indent="0in" style:auto-text-indent="false">
        <style:tab-stops>
          <style:tab-stop style:position="0.3827in"/>
          <style:tab-stop style:position="0.5217in"/>
        </style:tab-stops>
      </style:paragraph-properties>
      <style:text-properties style:font-name="Arial" fo:font-size="12pt" fo:font-weight="normal" style:font-size-asian="12pt" style:font-weight-asian="normal" style:font-size-complex="12pt" style:font-weight-complex="normal"/>
    </style:style>
    <style:style style:name="P16" style:family="paragraph" style:parent-style-name="Standard" style:list-style-name="L1">
      <style:paragraph-properties fo:margin-left="0.8752in" fo:margin-right="0in" fo:text-align="start" style:justify-single-word="false" fo:text-indent="0in" style:auto-text-indent="false">
        <style:tab-stops>
          <style:tab-stop style:position="0.5217in"/>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Standard" style:list-style-name="L1">
      <style:paragraph-properties fo:margin-left="0.8752in" fo:margin-right="0in" fo:text-align="start" style:justify-single-word="false" fo:text-indent="0in" style:auto-text-indent="false">
        <style:tab-stops>
          <style:tab-stop style:position="0.5217in"/>
        </style:tab-stops>
      </style:paragraph-properties>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Standard" style:list-style-name="L1">
      <style:paragraph-properties fo:margin-left="0.2874in" fo:margin-right="0in" fo:text-align="start" style:justify-single-word="false" fo:text-indent="0.0102in" style:auto-text-indent="false">
        <style:tab-stops/>
      </style:paragraph-properties>
    </style:style>
    <style:style style:name="T1" style:family="text">
      <style:text-properties fo:font-weight="normal" style:font-size-asian="12pt" style:font-weight-asian="normal" style:font-size-complex="12pt" style:font-weight-complex="normal" officeooo:rsid="00187a62"/>
    </style:style>
    <style:style style:name="T2" style:family="text">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officeooo:rsid="0005ae00"/>
    </style:style>
    <style:style style:name="T3" style:family="text">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officeooo:rsid="00187a62"/>
    </style:style>
    <style:style style:name="T4" style:family="text">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officeooo:rsid="00072fc4"/>
    </style:style>
    <style:style style:name="T5" style:family="text">
      <style:text-properties fo:font-variant="normal" fo:text-transform="none" fo:color="#000000" style:text-line-through-style="none" style:font-name="Times New Roman" fo:font-size="11.5pt" fo:letter-spacing="normal" fo:font-style="normal" style:text-underline-style="none" fo:font-weight="bold" style:text-blinking="false" fo:background-color="transparent" style:font-size-asian="12pt" style:font-weight-asian="bold" style:font-size-complex="12pt" style:font-weight-complex="bold" officeooo:rsid="0005ae00"/>
    </style:style>
    <style:style style:name="T6" style:family="text">
      <style:text-properties fo:font-variant="normal" fo:text-transform="none" fo:color="#000000" style:text-line-through-style="none" style:font-name="Times New Roman" fo:font-size="11.5pt" fo:letter-spacing="normal" fo:font-style="normal" style:text-underline-style="none" style:text-blinking="false" fo:background-color="transparent"/>
    </style:style>
    <style:style style:name="T7" style:family="text">
      <style:text-properties fo:font-variant="normal" fo:text-transform="none" fo:color="#000000" style:text-line-through-style="none" style:font-name="Times New Roman" fo:font-size="11.5pt" fo:letter-spacing="normal" fo:font-style="normal" style:text-underline-style="none" style:text-blinking="false" fo:background-color="transparent" officeooo:rsid="0005ae00"/>
    </style:style>
    <style:style style:name="T8" style:family="text">
      <style:text-properties fo:font-variant="normal" fo:text-transform="none" fo:color="#000000" style:text-line-through-style="none" style:font-name="Times New Roman" fo:font-size="11.5pt" fo:letter-spacing="normal" fo:font-style="normal" style:text-underline-style="none" style:text-blinking="false" fo:background-color="transparent" officeooo:rsid="0007e378"/>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officeooo:rsid="001bb62d"/>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officeooo:rsid="0017b1cd"/>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officeooo:rsid="0007e378"/>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officeooo:rsid="00082d41"/>
    </style:style>
    <style:style style:name="T13" style:family="text">
      <style:text-properties fo:font-variant="normal" fo:text-transform="none" fo:color="#000000" style:text-line-through-style="none" fo:font-size="11.5pt" fo:letter-spacing="normal" fo:font-style="normal" style:text-blinking="false" fo:background-color="transparent" officeooo:rsid="00072fc4"/>
    </style:style>
    <style:style style:name="T14" style:family="text">
      <style:text-properties fo:font-variant="normal" fo:text-transform="none" fo:color="#000000" style:text-line-through-style="none" fo:font-size="11.5pt" fo:letter-spacing="normal" fo:font-style="normal" style:text-blinking="false" fo:background-color="transparent" officeooo:rsid="0007e378"/>
    </style:style>
    <style:style style:name="T15" style:family="text">
      <style:text-properties fo:font-variant="normal" fo:text-transform="none" fo:color="#000000" style:text-line-through-style="none" fo:font-size="11.5pt" fo:letter-spacing="normal" fo:font-style="normal" style:text-blinking="false" fo:background-color="transparent" officeooo:rsid="001b6111"/>
    </style:style>
    <style:style style:name="T16" style:family="text">
      <style:text-properties fo:font-variant="normal" fo:text-transform="none" fo:color="#000000" style:text-line-through-style="none" fo:font-size="11.5pt" fo:letter-spacing="normal" fo:font-style="normal" style:text-blinking="false" fo:background-color="transparent" officeooo:rsid="00082d41"/>
    </style:style>
    <style:style style:name="T17" style:family="text">
      <style:text-properties officeooo:rsid="0017b1cd"/>
    </style:style>
    <style:style style:name="T18" style:family="text">
      <style:text-properties officeooo:rsid="00187a62"/>
    </style:style>
    <style:style style:name="T19" style:family="text">
      <style:text-properties officeooo:rsid="0005ae00"/>
    </style:style>
    <style:style style:name="T20" style:family="text">
      <style:text-properties officeooo:rsid="0007e378"/>
    </style:style>
    <style:style style:name="T21" style:family="text">
      <style:text-properties style:font-name="Times New Roman" fo:font-size="12pt" style:text-underline-style="none" fo:font-weight="normal" style:font-size-asian="12pt" style:font-weight-asian="normal" style:font-size-complex="12pt" style:font-weight-complex="normal" officeooo:rsid="001bb6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ings and Conditionals</text:p>
      <text:p text:style-name="P1"/>
      <text:p text:style-name="P2">Exercise 1</text:p>
      <text:list xml:id="list35215035" text:style-name="L1">
        <text:list-header>
          <text:p text:style-name="P10"><text:span text:style-name="T1">- </text:span><text:span text:style-name="T2">Write a program that takes a first, middle, and last name and returns a cslogin. A cslogin should be the first letter of the first name, then the first letter of the middle name, then the last name. For example, Annie Elizabeth Carlson has the cslogin 'aecarlson'.</text:span></text:p>
        </text:list-header>
      </text:list>
      <text:p text:style-name="P5"/>
      <text:p text:style-name="P6">Make sure to import the 'string' library for the rest of these problems.</text:p>
      <text:p text:style-name="P6"/>
      <text:p text:style-name="P2">Exercise <text:span text:style-name="T19">2</text:span></text:p>
      <text:list xml:id="list35246772" text:continue-numbering="true" text:style-name="L1">
        <text:list-header>
          <text:p text:style-name="P10"><text:span text:style-name="T3">- </text:span><text:span text:style-name="T2">Write a program that first trims trailing white space from a String then <text:s/>removes the last letter of a String. The String 'Artemis <text:s text:c="3"/>' would become 'Artemi'.</text:span></text:p>
        </text:list-header>
      </text:list>
      <text:p text:style-name="P6"/>
      <text:p text:style-name="P2">Exercise <text:span text:style-name="T19">3</text:span></text:p>
      <text:list xml:id="list35253571" text:continue-numbering="true" text:style-name="L1">
        <text:list-header>
          <text:p text:style-name="P10"><text:span text:style-name="T3">- </text:span><text:span text:style-name="T2">Write a program that tells you how many times the letter e appears in a String.</text:span></text:p>
          <text:p text:style-name="P10"><text:span text:style-name="T5">Challenge:</text:span><text:span text:style-name="T2"> Write a program that returns </text:span><text:span text:style-name="T4">how often each of the first three characters in a String appear in the entire String.</text:span></text:p>
        </text:list-header>
      </text:list>
      <text:p text:style-name="P3"/>
      <text:p text:style-name="P2">Exercise <text:span text:style-name="T20">4</text:span></text:p>
      <text:list xml:id="list35254582" text:continue-numbering="true" text:style-name="L1">
        <text:list-header>
          <text:p text:style-name="P11"><text:span text:style-name="T6">- </text:span><text:span text:style-name="T7">Write a program </text:span><text:span text:style-name="T8">takes an integer and returns the absolute value of the input.</text:span></text:p>
          <text:p text:style-name="P12"/>
        </text:list-header>
      </text:list>
      <text:p text:style-name="P2">Exercise <text:span text:style-name="T20">5</text:span></text:p>
      <text:list xml:id="list35244790" text:continue-numbering="true" text:style-name="L1">
        <text:list-header>
          <text:p text:style-name="P14"><text:span text:style-name="T21">- </text:span><text:span text:style-name="T9">Write a program that asks the user for </text:span><text:span text:style-name="T12">a </text:span><text:span text:style-name="T9">noun and whether the noun is proper, then prints the noun, capitalizing it if the noun was proper. Here is some sample interaction with the program</text:span><text:span text:style-name="T10">:</text:span></text:p>
          <text:list>
            <text:list-header>
              <text:p text:style-name="P15"><text:span text:style-name="T20">Input a noun</text:span><text:span text:style-name="T17">:</text:span></text:p>
            </text:list-header>
          </text:list>
          <text:p text:style-name="P16">&gt;&gt;&gt; <text:span text:style-name="T20">artemis</text:span></text:p>
          <text:p text:style-name="P16">Is the noun proper (type 'y' for yes and any other key for no)</text:p>
          <text:p text:style-name="P16">&gt;&gt;&gt; <text:span text:style-name="T20">y</text:span></text:p>
          <text:p text:style-name="P17">output: Artemis</text:p>
        </text:list-header>
      </text:list>
      <text:p text:style-name="P4"/>
      <text:p text:style-name="P2">Exercise <text:span text:style-name="T20">6</text:span></text:p>
      <text:list xml:id="list35236767" text:continue-numbering="true" text:style-name="L1">
        <text:list-header>
          <text:p text:style-name="P13"><text:span text:style-name="T18">- </text:span><text:span text:style-name="T13">Create a guessing game where the computer randomly chooses a number between 0 and 100 and has the user guess the number. After each guess, the program should tell the user if she was to</text:span><text:span text:style-name="T16">o</text:span><text:span text:style-name="T13"> high, to</text:span><text:span text:style-name="T16">o</text:span><text:span text:style-name="T13"> low, or correct.</text:span></text:p>
        </text:list-header>
      </text:list>
      <text:p text:style-name="P5"/>
      <text:p text:style-name="P2">Exercise <text:span text:style-name="T20">7 (Challenge)</text:span></text:p>
      <text:list xml:id="list35267547" text:continue-numbering="true" text:style-name="L1">
        <text:list-item>
          <text:list>
            <text:list-header>
              <text:p text:style-name="P18"><text:span text:style-name="T11">-</text:span><text:span text:style-name="T9"> Create a guessing game like in exercise 6, but have the user pick the number between 0 and 100 and the program guess the number. Your program doesn't have to be smart about guessing, but if it is, that's a plus. Below is a sample interaction with such a program:</text:span></text:p>
              <text:p text:style-name="P7">I guess 23. Is this too high (h), too low (l), or correct (c)?</text:p>
              <text:p text:style-name="P7">&gt;&gt;&gt; <text:span text:style-name="T20">h</text:span></text:p>
              <text:p text:style-name="P7">I guess 9. Is this too high (h), too low (l), or correct (c)?</text:p>
              <text:p text:style-name="P7">&gt;&gt;&gt; <text:span text:style-name="T20">l</text:span></text:p>
              <text:p text:style-name="P7">I guess 15. Is this too high (h), too low (l), or correct (c)?</text:p>
              <text:p text:style-name="P8"><text:span text:style-name="T15">&gt;&gt;&gt; </text:span><text:span text:style-name="T14">l</text:span></text:p>
              <text:p text:style-name="P7">I guess 18. Is this too high (h), too low (l), or correct (c)?</text:p>
              <text:p text:style-name="P9">&gt;&gt;&gt; c</text:p>
              <text:p text:style-name="P9">The answer is 18</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12T12:59:51</meta:creation-date>
    <dc:date>2012-07-09T15:11:49.85</dc:date>
    <meta:editing-duration>PT06H15M00S</meta:editing-duration>
    <meta:editing-cycles>4</meta:editing-cycles>
    <meta:generator>OpenOffice.org/3.0$Win32 OpenOffice.org_project/300m9$Build-9358</meta:generator>
    <meta:document-statistic meta:table-count="0" meta:image-count="0" meta:object-count="0" meta:page-count="1" meta:paragraph-count="31" meta:word-count="380" meta:character-count="1948"/>
  </office:meta>
</office:document-meta>
</file>