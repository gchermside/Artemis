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1CE3843E74.png"/>
  <manifest:file-entry manifest:media-type="image/png" manifest:full-path="Pictures/10000201000000A00000004CA85CA9D8.png"/>
  <manifest:file-entry manifest:media-type="image/jpeg" manifest:full-path="Pictures/1000000000000040000000432FA179C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1" svg:font-family="'Times New Roman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paragraph-rsid="0017cf1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7cf1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3083in" fo:margin-right="0in" fo:text-align="start" style:justify-single-word="false" fo:text-indent="0in" style:auto-text-indent="false">
        <style:tab-stops/>
      </style:paragraph-properties>
      <style:text-properties style:font-name="Times New Roman" fo:font-size="12pt" officeooo:paragraph-rsid="001930d0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officeooo:paragraph-rsid="001930d0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fo:font-weight="bold" officeooo:paragraph-rsid="001c0f8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7cf18" officeooo:paragraph-rsid="0017cf1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7cf18" officeooo:paragraph-rsid="0017cf1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cf18" officeooo:paragraph-rsid="0017cf18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.2874in" fo:margin-right="0in" fo:text-align="start" style:justify-single-word="false" fo:text-indent="0in" style:auto-text-indent="false">
        <style:tab-stops/>
      </style:paragraph-properties>
      <style:text-properties fo:font-size="12pt" fo:font-weight="normal" officeooo:rsid="00187a62" officeooo:paragraph-rsid="00187a62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.5in" fo:margin-right="0in" fo:text-align="start" style:justify-single-word="false" fo:text-indent="-0.2236in" style:auto-text-indent="false">
        <style:tab-stops/>
      </style:paragraph-properties>
      <style:text-properties style:font-name="Arial" fo:font-size="12pt" fo:font-style="normal" fo:font-weight="normal" officeooo:rsid="00187a62" officeooo:paragraph-rsid="00187a6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margin-left="0.2661in" fo:margin-right="0in" fo:text-align="start" style:justify-single-word="false" fo:text-indent="0.0102in" style:auto-text-indent="false">
        <style:tab-stops/>
      </style:paragraph-properties>
      <style:text-properties fo:font-size="12pt" fo:font-weight="normal" officeooo:rsid="00187a62" officeooo:paragraph-rsid="00187a6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2661in" fo:margin-right="0in" fo:text-align="start" style:justify-single-word="false" fo:text-indent="0.0102in" style:auto-text-indent="false">
        <style:tab-stops/>
      </style:paragraph-properties>
      <style:text-properties fo:font-size="12pt" fo:font-weight="normal" officeooo:rsid="001c0f88" officeooo:paragraph-rsid="001c0f8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left="0.3516in" fo:margin-right="0in" fo:text-align="start" style:justify-single-word="false" fo:text-indent="0.0535in" style:auto-text-indent="false">
        <style:tab-stops/>
      </style:paragraph-properties>
      <style:text-properties fo:font-size="12pt" fo:font-weight="normal" officeooo:rsid="00187a62" officeooo:paragraph-rsid="00187a6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3516in" fo:margin-right="0in" fo:text-align="start" style:justify-single-word="false" fo:text-indent="0.0535in" style:auto-text-indent="false">
        <style:tab-stops/>
      </style:paragraph-properties>
      <style:text-properties fo:font-size="12pt" fo:font-weight="normal" officeooo:rsid="00187a62" officeooo:paragraph-rsid="00187a6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fo:font-weight="normal" officeooo:rsid="001930d0" officeooo:paragraph-rsid="001930d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930d0" officeooo:paragraph-rsid="001930d0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officeooo:rsid="001930d0" officeooo:paragraph-rsid="001930d0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line-through-style="none" style:font-name="Arial1" fo:font-size="11.5pt" fo:letter-spacing="normal" fo:font-style="normal" style:text-underline-style="none" fo:font-weight="normal" officeooo:rsid="001930d0" officeooo:paragraph-rsid="001930d0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line-through-style="none" style:font-name="Arial1" fo:font-size="11.5pt" fo:letter-spacing="normal" fo:font-style="normal" style:text-underline-style="none" fo:font-weight="normal" officeooo:rsid="001a8094" officeooo:paragraph-rsid="001a8094" style:text-blinking="false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margin-left="0.2764in" fo:margin-right="0in" fo:text-align="start" style:justify-single-word="false" fo:text-indent="0in" style:auto-text-indent="false">
        <style:tab-stops/>
      </style:paragraph-properties>
      <style:text-properties style:font-name="Times New Roman" fo:font-size="12pt" officeooo:paragraph-rsid="001930d0" style:font-size-asian="12pt" style:font-size-complex="12pt"/>
    </style:style>
    <style:style style:name="P21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a8094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7cf18"/>
    </style:style>
    <style:style style:name="T2" style:family="text">
      <style:text-properties officeooo:rsid="00187a62"/>
    </style:style>
    <style:style style:name="T3" style:family="text">
      <style:text-properties fo:font-variant="normal" fo:text-transform="none" fo:color="#000000" style:font-name="Times New Roman1" fo:letter-spacing="normal" fo:font-style="normal" fo:font-weight="normal" officeooo:rsid="001930d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Arial1" fo:letter-spacing="normal" fo:font-style="normal" style:text-underline-style="none" fo:font-weight="normal" officeooo:rsid="001930d0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Arial1" fo:letter-spacing="normal" fo:font-style="normal" style:text-underline-style="none" fo:font-weight="normal" officeooo:rsid="0017cf18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1930d0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187a62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1a8094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1aa4da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1c0f88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font-name="Times New Roman" fo:letter-spacing="normal" fo:font-style="normal" style:text-underline-style="none" officeooo:rsid="001c0f88" style:text-blinking="false" fo:background-color="transparent"/>
    </style:style>
    <style:style style:name="T12" style:family="text">
      <style:text-properties officeooo:rsid="001c0f8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e93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duction to Python!</text:p>
      <text:p text:style-name="P7"/>
      <text:p text:style-name="P2"><text:span text:style-name="T1">Now it's time for your second exercise in </text:span><text:span text:style-name="T2">p</text:span><text:span text:style-name="T1">ython! These programs should be pretty similar to the “Hello world!” program you just wrote, so feel free to reference what you did for that if you are getting confused.</text:span></text:p>
      <text:p text:style-name="P8"/>
      <text:p text:style-name="P1"><text:span text:style-name="T12">Exercise 1</text:span><text:span text:style-name="T1"><text:tab/></text:span></text:p>
      <text:list xml:id="list1224595626" text:style-name="L1">
        <text:list-header>
          <text:p text:style-name="P9">- Create a python program that prints your name, school, birthday, and favorite color separated by commas. The output should look like thi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"><text:span text:style-name="T14">&gt;&gt;&gt;</text:span>Annie, Brown University, 3/19/92, green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  <text:p text:style-name="P11">Then run the program.</text:p>
                    </text:list-item>
                  </text:list>
                </text:list-item>
              </text:list>
            </text:list-item>
          </text:list>
        </text:list-header>
      </text:list>
      <text:p text:style-name="P12"/>
      <text:p text:style-name="P5"><text:span text:style-name="T12">Exercise 2</text:span><text:span text:style-name="T1"><text:tab/></text:span></text:p>
      <text:list xml:id="list107258820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9">- Alter the program so that it prints your name, school, birthday, and favorite color on separate lines. The output should look like this:</text:p>
                      <text:p text:style-name="P10"><text:span text:style-name="T14">&gt;&gt;&gt;</text:span>Annie</text:p>
                      <text:p text:style-name="P10"><text:span text:style-name="T14">&gt;&gt;&gt;</text:span>Brown University</text:p>
                      <text:p text:style-name="P10"><text:span text:style-name="T14">&gt;&gt;&gt;</text:span>3/19/92</text:p>
                      <text:p text:style-name="P10"><text:span text:style-name="T14">&gt;&gt;&gt;</text:span>green</text:p>
                      <text:p text:style-name="P13">Then run the program.<text:tab/></text:p>
                    </text:list-header>
                  </text:list>
                </text:list-item>
              </text:list>
            </text:list-item>
          </text:list>
        </text:list-item>
      </text:list>
      <text:p text:style-name="P14"/>
      <text:p text:style-name="P15">In almost any programming language, including python, “\n” is the newline character. That means if you put “/n” with some words in quotation marks (called a<text:span text:style-name="T13"> String</text:span>, but we'll get to that later!), there will be an enter in the output. So for example, the program:</text:p>
      <text:p text:style-name="P4"><text:bookmark text:name="internal-source-marker_0.9207052409183234"/><text:span text:style-name="T4"><text:tab/>def main():</text:span><text:span text:style-name="T3"><text:line-break/><text:tab/><text:tab/></text:span><text:span text:style-name="T4">print “Hello \nworld!”</text:span><text:span text:style-name="T3"><text:line-break/> <text:s text:c="2"/><text:tab/></text:span><text:span text:style-name="T4">main()</text:span></text:p>
      <text:p text:style-name="P16">would print:</text:p>
      <text:p text:style-name="P17"><text:tab/><text:span text:style-name="T14">&gt;&gt;&gt;</text:span>Hello</text:p>
      <text:p text:style-name="P17"><text:tab/><text:span text:style-name="T14">&gt;&gt;&gt;</text:span>world!</text:p>
      <text:p text:style-name="P17"/>
      <text:p text:style-name="P5"><text:span text:style-name="T11">Exercise 3</text:span><text:span text:style-name="T5"><text:tab/></text:span></text:p>
      <text:p text:style-name="P3"><text:span text:style-name="T6">- Alter your program so that it only requires one print but still </text:span><text:span text:style-name="T9">outputs</text:span><text:span text:style-name="T7"> your name, school, birthday, and favorite color on separate lines. </text:span><text:span text:style-name="T6">Then run the program. </text:span></text:p>
      <text:list xml:id="list267431083" text:style-name="L2">
        <text:list-header>
          <text:p text:style-name="P18"/>
        </text:list-header>
      </text:list>
      <text:p text:style-name="P19">CHALLENGE </text:p>
      <text:p text:style-name="P16"/>
      <text:list xml:id="list1440544972" text:style-name="L3">
        <text:list-header>
          <text:p text:style-name="P20"><text:span text:style-name="T10">- </text:span><text:span text:style-name="T8">Create a program that prints ascii art to the console. Here are some examples, but feel free to make your own:</text:span></text:p>
        </text:list-header>
      </text:list>
      <text:p text:style-name="P21"/>
      <text:p text:style-name="P16"><draw:frame draw:style-name="fr1" draw:name="graphics2" text:anchor-type="paragraph" svg:width="2.139in" svg:height="1.4138in" draw:z-index="0"><draw:image xlink:href="Pictures/10000000000001900000011CE3843E74.png" xlink:type="simple" xlink:show="embed" xlink:actuate="onLoad"/></draw:frame><draw:frame draw:style-name="fr2" draw:name="graphics3" text:anchor-type="paragraph" svg:x="4.8681in" svg:y="0.2098in" svg:width="1.2902in" svg:height="1.1228in" draw:z-index="1"><draw:image xlink:href="Pictures/10000201000000A00000004CA85CA9D8.png" xlink:type="simple" xlink:show="embed" xlink:actuate="onLoad"/></draw:frame><draw:frame draw:style-name="fr3" draw:name="graphics1" text:anchor-type="paragraph" svg:x="0.7874in" svg:y="-0.011in" svg:width="0.9091in" svg:height="1.2429in" draw:z-index="2"><draw:image xlink:href="Pictures/1000000000000040000000432FA179C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1" svg:font-family="'Times New Roman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1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1T13:36:19</meta:creation-date>
    <dc:date>2012-06-12T12:04:13</dc:date>
    <meta:editing-duration>PT02H02M56S</meta:editing-duration>
    <meta:editing-cycles>6</meta:editing-cycles>
    <meta:generator>OpenOffice.org/3.2$Linux OpenOffice.org_project/320m19$Build-9505</meta:generator>
    <meta:document-statistic meta:table-count="0" meta:image-count="3" meta:object-count="0" meta:page-count="1" meta:paragraph-count="22" meta:word-count="224" meta:character-count="1303"/>
  </office:meta>
</office:document-meta>
</file>